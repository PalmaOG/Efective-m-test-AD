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2" style:parent-style-name="Standard">
      <style:text-properties fo:font-weight="bold" style:font-weight-asian="bold" style:font-weight-complex="bold"/>
    </style:style>
    <style:style style:family="paragraph" style:master-page-name="Standard" style:name="P1" style:parent-style-name="Standard"/>
    <style:style style:family="text" style:name="T2">
      <style:text-properties fo:font-weight="normal" style:font-weight-asian="normal" style:font-weight-complex="normal"/>
    </style:style>
    <style:style style:family="text" style:name="T1">
      <style:text-properties fo:font-weight="bold" style:font-weight-asian="bold" style:font-weight-complex="bold"/>
    </style:style>
  </office:automatic-styles>
  <office:body>
    <office:text>
      <text:tracked-changes text:track-changes="false"/>
      <text:p co:para-mark-style-name="T1" text:style-name="P1"><text:span text:style-name="T1">Задание 1.</text:span></text:p>
      <text:p text:style-name="Standard"/>
      <text:p text:style-name="Standard">SELECT </text:p>
      <text:p text:style-name="Standard"><text:s text:c="4"/>id,</text:p>
      <text:p text:style-name="Standard"><text:s text:c="4"/>scores,</text:p>
      <text:p text:style-name="Standard"><text:s text:c="4"/>RANK() OVER (ORDER BY scores DESC) AS position</text:p>
      <text:p text:style-name="Standard">FROM examination</text:p>
      <text:p text:style-name="Standard">ORDER BY position;</text:p>
      <text:p co:para-mark-style-name="T1" text:style-name="Standard"><text:line-break/><text:span text:style-name="T1">Задание 2.</text:span></text:p>
      <text:p co:para-mark-style-name="T1" text:style-name="P2"/>
      <text:p co:para-mark-style-name="T2" text:style-name="Standard">Ответ: минимально 30, максимально 600.</text:p>
      <text:p co:para-mark-style-name="T2" text:style-name="P3"/>
      <text:p co:para-mark-style-name="T1" text:style-name="Standard"><text:span text:style-name="T1">Задание 3.</text:span></text:p>
      <text:p text:style-name="Standard">SELECT </text:p>
      <text:p text:style-name="Standard"><text:s text:c="4"/>a.client_id</text:p>
      <text:p text:style-name="Standard">FROM </text:p>
      <text:p text:style-name="Standard"><text:s text:c="4"/>account a</text:p>
      <text:p text:style-name="Standard">LEFT JOIN </text:p>
      <text:p text:style-name="Standard"><text:s text:c="4"/>transaction t </text:p>
      <text:p text:style-name="Standard"><text:s text:c="4"/>ON a.id = t.account_id </text:p>
      <text:p text:style-name="Standard"><text:s text:c="4"/>AND t.transaction_date &gt;= DATE_SUB(CURDATE(), INTERVAL 1 MONTH)</text:p>
      <text:p text:style-name="Standard"><text:s text:c="4"/>AND t.type = 'purchase' <text:s text:c="1"/>#код покупки</text:p>
      <text:p text:style-name="Standard">GROUP BY </text:p>
      <text:p text:style-name="Standard"><text:s text:c="4"/>a.client_id</text:p>
      <text:p text:style-name="Standard">HAVING </text:p>
      <text:p co:para-mark-style-name="T1" text:style-name="Standard"><text:s text:c="4"/>COALESCE(SUM(t.amount), 0) &lt; 5000;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6-06-23T16:27:56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