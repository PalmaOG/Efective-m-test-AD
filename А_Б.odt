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paragraph" style:name="P2" style:parent-style-name="Standard">
      <style:text-properties fo:font-weight="bold" style:font-weight-asian="bold" style:font-weight-complex="bold"/>
    </style:style>
    <style:style style:family="paragraph" style:master-page-name="Standard" style:name="P1" style:parent-style-name="Standard"/>
    <style:style style:family="text" style:name="T1">
      <style:text-properties fo:font-weight="bold" style:font-weight-asian="bold" style:font-weight-complex="bold"/>
    </style:style>
  </office:automatic-styles>
  <office:body>
    <office:text>
      <text:tracked-changes text:track-changes="false"/>
      <text:p co:para-mark-style-name="T1" text:style-name="P1"><text:span text:style-name="T1">Задание 1.</text:span></text:p>
      <text:p text:style-name="Standard">Правильные утверждения: 2, 3 и 4.</text:p>
      <text:p text:style-name="Standard"/>
      <text:p text:style-name="Standard">Пояснение:</text:p>
      <text:p text:style-name="Standard"/>
      <text:p text:style-name="Standard">Утверждение 2 верно: тест проведён лишь в одном небольшом городе, поэтому выборка нерепрезентативна для всей страны с её разнообразием условий (мегаполисы, пробки, плотность застройки и т.д.). Масштабировать результат на всю страну напрямую нельзя.</text:p>
      <text:p text:style-name="Standard"/>
      <text:p text:style-name="Standard">Утверждение 3 верно: с точки зрения статистики, выборка репрезентативна для той генеральной совокупности, которую она представляет. Если тест был в типичном небольшом городе, результаты можно обоснованно распространять только на похожие небольшие города.</text:p>
      <text:p text:style-name="Standard"/>
      <text:p text:style-name="Standard">Утверждение 4 верно: полученный значимый эффект доказывает потенциал идеи, но для внедрения по всей стране требуются дополнительные эксперименты в городах разного типа и масштаба, чтобы подтвердить устойчивость эффекта.</text:p>
      <text:p text:style-name="Standard"/>
      <text:p text:style-name="Standard">Утверждение 1 неверно: повторение того же масштаба (количества транспортёрных средств) не решает проблему нерепрезентативности — разница между малым городом и, например, миллионником не сводится только к количеству курьеров.</text:p>
      <text:p text:style-name="Standard"/>
      <text:p co:para-mark-style-name="T1" text:style-name="Standard"><text:span text:style-name="T1">Задание 2.</text:span></text:p>
      <text:p co:para-mark-style-name="T1" text:style-name="P2"/>
      <text:p text:style-name="Standard">Правильное утверждение:</text:p>
      <text:p text:style-name="Standard">Вероятность наблюдения такого или более экстремального результата при условии, что нулевая гипотеза верна.</text:p>
      <text:p text:style-name="Standard"/>
      <text:p text:style-name="Standard">Остальные варианты неверны:</text:p>
      <text:p text:style-name="Standard"/>
      <text:p text:style-name="Standard">p-value не равно вероятности истинности нулевой гипотезы;</text:p>
      <text:p text:style-name="Standard"/>
      <text:p text:style-name="Standard">уровень значимости α устанавливается до теста и не тождественен p-value;</text:p>
      <text:p text:style-name="Standard"/>
      <text:p co:para-mark-style-name="T1" text:style-name="Standard">среднее значение выборки – это описательная статистика, а не p-value.</text:p>
      <text:p co:para-mark-style-name="T1" text:style-name="P2"/>
      <text:p co:para-mark-style-name="T1" text:style-name="Standard"><text:span text:style-name="T1">Задание 3.</text:span></text:p>
      <text:p co:para-mark-style-name="T1" text:style-name="P2"/>
      <text:p text:style-name="Standard">Да, можем.</text:p>
      <text:p text:style-name="Standard"/>
      <text:p text:style-name="Standard">Несмотря на логнормальное распределение исходной метрики, при столь больших выборках (&gt;5 млн наблюдений в каждой группе) вступает в силу центральная предельная теорема: распределение выборочных средних будет близко к нормальному. Отсутствие значительных выбросов также способствует корректности t-критерия. T-тест Стьюдента в таких условиях устойчив к нарушению предположения о нормальности исходных данных и может применяться для проверки гипотезы о неравенстве средних.</text:p>
      <text:p co:para-mark-style-name="T1" text:style-name="P2"/>
      <text:p co:para-mark-style-name="T1" text:style-name="P2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6-06-23T16:33:12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